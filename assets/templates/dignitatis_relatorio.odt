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Standard"><text:line-break/></text:p>
      <text:p text:style-name="Standard"><text:line-break/></text:p>
      <text:p text:style-name="Cover">RELATÓRIO</text:p>
      <text:p text:style-name="Heading1">[Título do Relatório]</text:p>
      <text:p text:style-name="Tagline">Dignidade · Dignidad · Tekó Porã · Ọlá</text:p>
      <text:p text:style-name="Standard"><text:line-break/></text:p>
      <text:p text:style-name="Tagline">Período: [mês/AAAA – mês/AAAA]</text:p>
      <text:p text:style-name="Tagline">Elaborado por: [Nome/Equipe]</text:p>
      <text:p text:style-name="Tagline">Data: [DD/MM/AAAA]</text:p>
      <text:p text:style-name="Standard"><text:line-break/></text:p>
      <text:p text:style-name="OrgName">DIGNITATIS — Organização de Direitos Humanos</text:p>
      <text:p text:style-name="Standard"><text:soft-page-break/></text:p>
      <text:p text:style-name="OrgName">DIGNITATIS</text:p>
      <text:p text:style-name="Tagline">Dignidade · Dignidad · Tekó Porã · Ọlá</text:p>
      <text:p text:style-name="Tagline">Organização de Direitos Humanos</text:p>
      <text:p text:style-name="Standard"><text:line-break/></text:p>
      <text:p text:style-name="Heading2">SUMÁRIO</text:p>
      <text:p text:style-name="Standard">1. Apresentação</text:p>
      <text:p text:style-name="Standard">2. Contexto e Objetivos</text:p>
      <text:p text:style-name="Standard">3. Metodologia</text:p>
      <text:p text:style-name="Standard">4. Resultados e Análise</text:p>
      <text:p text:style-name="Standard">5. Conclusões e Recomendações</text:p>
      <text:p text:style-name="Standard">6. Referências</text:p>
      <text:p text:style-name="Standard">7. Anexos</text:p>
      <text:p text:style-name="Standard"><text:soft-page-break/></text:p>
      <text:p text:style-name="OrgName">DIGNITATIS</text:p>
      <text:p text:style-name="Tagline">Dignidade · Dignidad · Tekó Porã · Ọlá</text:p>
      <text:p text:style-name="Tagline">Organização de Direitos Humanos</text:p>
      <text:p text:style-name="Standard"><text:line-break/></text:p>
      <text:p text:style-name="Heading2">1. Apresentação</text:p>
      <text:p text:style-name="Standard">[Insira aqui o conteúdo desta seção. Substitua este texto pelo conteúdo real do relatório.]</text:p>
      <text:p text:style-name="Standard"><text:line-break/></text:p>
      <text:p text:style-name="Standard">[Insira aqui o conteúdo desta seção. Substitua este texto pelo conteúdo real do relatório.]</text:p>
      <text:p text:style-name="Standard"><text:line-break/></text:p>
      <text:p text:style-name="Standard"><text:line-break/></text:p>
      <text:p text:style-name="Footer">[Nome Legal da Organização]  ·  CNPJ: [00.000.000/0000-00]  ·  [Endereço]  ·  [Cidade/UF]  ·  [e-mail]  ·  [site]</text:p>
      <text:p text:style-name="Standard"><text:soft-page-break/></text:p>
      <text:p text:style-name="OrgName">DIGNITATIS</text:p>
      <text:p text:style-name="Tagline">Dignidade · Dignidad · Tekó Porã · Ọlá</text:p>
      <text:p text:style-name="Tagline">Organização de Direitos Humanos</text:p>
      <text:p text:style-name="Standard"><text:line-break/></text:p>
      <text:p text:style-name="Heading2">2. Contexto e Objetivos</text:p>
      <text:p text:style-name="Standard">[Insira aqui o conteúdo desta seção. Substitua este texto pelo conteúdo real do relatório.]</text:p>
      <text:p text:style-name="Standard"><text:line-break/></text:p>
      <text:p text:style-name="Standard">[Insira aqui o conteúdo desta seção. Substitua este texto pelo conteúdo real do relatório.]</text:p>
      <text:p text:style-name="Standard"><text:line-break/></text:p>
      <text:p text:style-name="Standard"><text:line-break/></text:p>
      <text:p text:style-name="Footer">[Nome Legal da Organização]  ·  CNPJ: [00.000.000/0000-00]  ·  [Endereço]  ·  [Cidade/UF]  ·  [e-mail]  ·  [site]</text:p>
      <text:p text:style-name="Standard"><text:soft-page-break/></text:p>
      <text:p text:style-name="OrgName">DIGNITATIS</text:p>
      <text:p text:style-name="Tagline">Dignidade · Dignidad · Tekó Porã · Ọlá</text:p>
      <text:p text:style-name="Tagline">Organização de Direitos Humanos</text:p>
      <text:p text:style-name="Standard"><text:line-break/></text:p>
      <text:p text:style-name="Heading2">3. Metodologia</text:p>
      <text:p text:style-name="Standard">[Insira aqui o conteúdo desta seção. Substitua este texto pelo conteúdo real do relatório.]</text:p>
      <text:p text:style-name="Standard"><text:line-break/></text:p>
      <text:p text:style-name="Standard">[Insira aqui o conteúdo desta seção. Substitua este texto pelo conteúdo real do relatório.]</text:p>
      <text:p text:style-name="Standard"><text:line-break/></text:p>
      <text:p text:style-name="Standard"><text:line-break/></text:p>
      <text:p text:style-name="Footer">[Nome Legal da Organização]  ·  CNPJ: [00.000.000/0000-00]  ·  [Endereço]  ·  [Cidade/UF]  ·  [e-mail]  ·  [site]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top="0cm" fo:margin-bottom="0.212cm"/>
      <style:text-properties fo:font-size="11pt" style:font-name="Calibri" fo:color="#1c1c1c"/>
    </style:style>
    <style:style style:name="Heading1" style:family="paragraph" style:parent-style-name="Standard" style:class="text">
      <style:paragraph-properties fo:text-align="left" fo:margin-top="0.4cm" fo:margin-bottom="0.2cm"/>
      <style:text-properties fo:font-size="18pt" fo:font-weight="bold" style:font-name="Georgia" fo:color="#4a7a5c"/>
    </style:style>
    <style:style style:name="Heading2" style:family="paragraph" style:parent-style-name="Standard" style:class="text">
      <style:paragraph-properties fo:margin-top="0.3cm" fo:margin-bottom="0.15cm"/>
      <style:text-properties fo:font-size="14pt" fo:font-weight="bold" style:font-name="Georgia" fo:color="#2d3d2f"/>
    </style:style>
    <style:style style:name="OrgName" style:family="paragraph" style:parent-style-name="Standard" style:class="text">
      <style:paragraph-properties fo:text-align="center" fo:margin-bottom="0.1cm"/>
      <style:text-properties fo:font-size="18pt" fo:font-weight="bold" style:font-name="Georgia" fo:color="#2d3d2f"/>
    </style:style>
    <style:style style:name="Tagline" style:family="paragraph" style:parent-style-name="Standard" style:class="text">
      <style:paragraph-properties fo:text-align="center" fo:margin-bottom="0.3cm"/>
      <style:text-properties fo:font-size="8pt" style:font-name="Georgia" fo:color="#8c9e8c"/>
    </style:style>
    <style:style style:name="Footer" style:family="paragraph" style:parent-style-name="Standard" style:class="text">
      <style:paragraph-properties fo:text-align="center" fo:margin-top="0.3cm"/>
      <style:text-properties fo:font-size="7pt" style:font-name="Calibri" fo:color="#8c9e8c"/>
    </style:style>
    <style:style style:name="FieldLabel" style:family="paragraph" style:parent-style-name="Standard" style:class="text">
      <style:paragraph-properties fo:margin-bottom="0.1cm"/>
      <style:text-properties fo:font-size="10pt" style:font-name="Calibri" fo:color="#1c1c1c"/>
    </style:style>
    <style:style style:name="Cover" style:family="paragraph" style:parent-style-name="Standard" style:class="text">
      <style:paragraph-properties fo:text-align="center" fo:margin-bottom="0.4cm"/>
      <style:text-properties fo:font-size="28pt" fo:font-weight="bold" style:font-name="Georgia" fo:color="#4a7a5c"/>
    </style:style>
  </office:styles>
  <office:automatic-styles>
    <style:page-layout style:name="PageLayout">
      <style:page-layout-properties fo:page-width="21cm" fo:page-height="29.7cm" fo:margin-top="2.5cm" fo:margin-bottom="2.5cm" fo:margin-left="3cm" fo:margin-right="2cm"/>
    </style:page-layout>
  </office:automatic-styles>
  <office:master-styles>
    <style:master-page style:name="Standard" style:page-layout-name="PageLayout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creator>Dignitatis</dc:creator>
    <meta:generator>Dignitatis Template Generator</meta:generator>
  </office:meta>
</office:document-meta>
</file>
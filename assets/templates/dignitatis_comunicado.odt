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/>
  <office:body>
    <office:text>
      <text:p text:style-name="OrgName">DIGNITATIS</text:p>
      <text:p text:style-name="Tagline">Direitos Humanos · Paraíba · Brasil</text:p>
      <text:p text:style-name="Tagline">Comunicado Institucional</text:p>
      <text:p text:style-name="Standard"><text:line-break/></text:p>
      <text:p text:style-name="Standard"><text:line-break/></text:p>
      <text:p text:style-name="Standard">[Cidade], [DD] de [mês] de [AAAA]</text:p>
      <text:p text:style-name="Standard"><text:line-break/></text:p>
      <text:p text:style-name="Standard">A quem possa interessar,</text:p>
      <text:p text:style-name="Standard"><text:line-break/></text:p>
      <text:p text:style-name="Standard">[Insira aqui o texto do comunicado. Este parágrafo deve ser substituído pelo conteúdo real.]</text:p>
      <text:p text:style-name="Standard"><text:line-break/></text:p>
      <text:p text:style-name="Standard">[Insira aqui o texto do comunicado. Este parágrafo deve ser substituído pelo conteúdo real.]</text:p>
      <text:p text:style-name="Standard"><text:line-break/></text:p>
      <text:p text:style-name="Standard">[Insira aqui o texto do comunicado. Este parágrafo deve ser substituído pelo conteúdo real.]</text:p>
      <text:p text:style-name="Standard"><text:line-break/></text:p>
      <text:p text:style-name="Standard">[Insira aqui o texto do comunicado. Este parágrafo deve ser substituído pelo conteúdo real.]</text:p>
      <text:p text:style-name="Standard"><text:line-break/></text:p>
      <text:p text:style-name="Standard">Respeitosamente,</text:p>
      <text:p text:style-name="Standard"><text:line-break/></text:p>
      <text:p text:style-name="Standard"><text:line-break/></text:p>
      <text:p text:style-name="Standard">[Nome Completo]</text:p>
      <text:p text:style-name="Standard">[Cargo]</text:p>
      <text:p text:style-name="Standard">DIGNITATIS</text:p>
      <text:p text:style-name="Standard"><text:line-break/></text:p>
      <text:p text:style-name="Footer">[Nome Legal da Organização]  ·  CNPJ: [00.000.000/0000-00]  ·  [Endereço]  ·  [Cidade/UF]  ·  [e-mail]  ·  [si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 style:class="text">
      <style:paragraph-properties fo:margin-top="0cm" fo:margin-bottom="0.212cm"/>
      <style:text-properties fo:font-size="11pt" style:font-name="Source Sans Pro" fo:color="#1c1c1c"/>
    </style:style>
    <style:style style:name="Heading1" style:family="paragraph" style:parent-style-name="Standard" style:class="text">
      <style:paragraph-properties fo:text-align="left" fo:margin-top="0.4cm" fo:margin-bottom="0.2cm"/>
      <style:text-properties fo:font-size="18pt" fo:font-weight="bold" style:font-name="Fraunces" fo:color="#b54e31"/>
    </style:style>
    <style:style style:name="Heading2" style:family="paragraph" style:parent-style-name="Standard" style:class="text">
      <style:paragraph-properties fo:margin-top="0.3cm" fo:margin-bottom="0.15cm"/>
      <style:text-properties fo:font-size="14pt" fo:font-weight="bold" style:font-name="Fraunces" fo:color="#0f1f3d"/>
    </style:style>
    <style:style style:name="OrgName" style:family="paragraph" style:parent-style-name="Standard" style:class="text">
      <style:paragraph-properties fo:text-align="center" fo:margin-bottom="0.1cm"/>
      <style:text-properties fo:font-size="18pt" fo:font-weight="bold" style:font-name="Fraunces" fo:color="#0f1f3d"/>
    </style:style>
    <style:style style:name="Tagline" style:family="paragraph" style:parent-style-name="Standard" style:class="text">
      <style:paragraph-properties fo:text-align="center" fo:margin-bottom="0.3cm"/>
      <style:text-properties fo:font-size="8pt" style:font-name="Fraunces" fo:color="#9e8e7c"/>
    </style:style>
    <style:style style:name="Footer" style:family="paragraph" style:parent-style-name="Standard" style:class="text">
      <style:paragraph-properties fo:text-align="center" fo:margin-top="0.3cm"/>
      <style:text-properties fo:font-size="7pt" style:font-name="Source Sans Pro" fo:color="#9e8e7c"/>
    </style:style>
    <style:style style:name="FieldLabel" style:family="paragraph" style:parent-style-name="Standard" style:class="text">
      <style:paragraph-properties fo:margin-bottom="0.1cm"/>
      <style:text-properties fo:font-size="10pt" style:font-name="Source Sans Pro" fo:color="#1c1c1c"/>
    </style:style>
    <style:style style:name="Cover" style:family="paragraph" style:parent-style-name="Standard" style:class="text">
      <style:paragraph-properties fo:text-align="center" fo:margin-bottom="0.4cm"/>
      <style:text-properties fo:font-size="28pt" fo:font-weight="bold" style:font-name="Fraunces" fo:color="#b54e31"/>
    </style:style>
  </office:styles>
  <office:automatic-styles>
    <style:page-layout style:name="PageLayout">
      <style:page-layout-properties fo:page-width="21cm" fo:page-height="29.7cm" fo:margin-top="2.5cm" fo:margin-bottom="2.5cm" fo:margin-left="3cm" fo:margin-right="2cm"/>
    </style:page-layout>
  </office:automatic-styles>
  <office:master-styles>
    <style:master-page style:name="Standard" style:page-layout-name="PageLayout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creator>Dignitatis</dc:creator>
    <meta:generator>Dignitatis Template Generator</meta:generator>
  </office:meta>
</office:document-meta>
</file>